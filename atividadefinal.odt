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E000001181D563E92.jpg" manifest:media-type="image/jpeg"/>
  <manifest:file-entry manifest:full-path="Pictures/100000010000033200000222CE847633.png" manifest:media-type="image/png"/>
  <manifest:file-entry manifest:full-path="Pictures/100000010000014B00000035E109D7BD.png" manifest:media-type="image/png"/>
  <manifest:file-entry manifest:full-path="Pictures/10000001000003340000022D6D3C76FA.png" manifest:media-type="image/png"/>
  <manifest:file-entry manifest:full-path="Pictures/100000010000032F0000022580902E6E.png" manifest:media-type="image/png"/>
  <manifest:file-entry manifest:full-path="Pictures/100000010000033500000222F7554D1B.png" manifest:media-type="image/png"/>
  <manifest:file-entry manifest:full-path="Pictures/10000001000003130000010056B7EDDB.png" manifest:media-type="image/png"/>
  <manifest:file-entry manifest:full-path="Pictures/1000000100000317000000F8A884EDD4.png" manifest:media-type="image/png"/>
  <manifest:file-entry manifest:full-path="Pictures/100000010000032F000002254E1ACC07.png" manifest:media-type="image/png"/>
  <manifest:file-entry manifest:full-path="Pictures/10000001000003090000021B25A694DD.png" manifest:media-type="image/png"/>
  <manifest:file-entry manifest:full-path="Pictures/10000001000003090000021B8B6CC74B.png" manifest:media-type="image/png"/>
  <manifest:file-entry manifest:full-path="Pictures/10000000000001690000016AE3AA8E61.jpg" manifest:media-type="image/jpeg"/>
  <manifest:file-entry manifest:full-path="Pictures/100000010000032B000001A8EEC6496B.png" manifest:media-type="image/png"/>
  <manifest:file-entry manifest:full-path="Pictures/100000010000034B0000019DA70F153D.png" manifest:media-type="image/png"/>
  <manifest:file-entry manifest:full-path="Pictures/1000000100000317000000F8BBFFAD06.png" manifest:media-type="image/png"/>
  <manifest:file-entry manifest:full-path="Pictures/1000000100000324000001CAE8E6CD98.png" manifest:media-type="image/png"/>
  <manifest:file-entry manifest:full-path="Pictures/100000010000032F000002258D0E6B32.png" manifest:media-type="image/png"/>
  <manifest:file-entry manifest:full-path="Pictures/1000000100000266000000EA3B622FCE.png" manifest:media-type="image/png"/>
  <manifest:file-entry manifest:full-path="Pictures/10000001000003090000021B5B7DDFC4.png" manifest:media-type="image/png"/>
  <manifest:file-entry manifest:full-path="Pictures/10000001000001FE000000A0C82DDA34.png" manifest:media-type="image/png"/>
  <manifest:file-entry manifest:full-path="Pictures/1000000100000328000000990A192E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Table1" style:family="table" style:master-page-name="MP0">
      <style:table-properties style:width="17.119cm" fo:margin-left="-0.018cm" style:page-number="auto" table:align="left"/>
    </style:style>
    <style:style style:name="Table1.A" style:family="table-column">
      <style:table-column-properties style:column-width="2.415cm"/>
    </style:style>
    <style:style style:name="Table1.B" style:family="table-column">
      <style:table-column-properties style:column-width="11.264cm"/>
    </style:style>
    <style:style style:name="Table1.C" style:family="table-column">
      <style:table-column-properties style:column-width="3.44cm"/>
    </style:style>
    <style:style style:name="Table1.1" style:family="table-row">
      <style:table-row-properties style:min-row-height="1.198cm"/>
    </style:style>
    <style:style style:name="Table1.A1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none" fo:border-bottom="1pt solid #000001" style:writing-mode="lr-tb">
        <style:background-image/>
      </style:table-cell-properties>
    </style:style>
    <style:style style:name="P1" style:family="paragraph" style:parent-style-name="Rodapé">
      <style:paragraph-properties fo:text-align="center" style:justify-single-word="false"/>
    </style:style>
    <style:style style:name="P2" style:family="paragraph" style:parent-style-name="Standard">
      <style:paragraph-properties fo:margin-top="0.071cm" fo:margin-bottom="0.071cm" style:contextual-spacing="false" fo:text-align="center" style:justify-single-word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15%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font-size="10.5pt" fo:font-weight="bold" officeooo:paragraph-rsid="0030c567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fo:font-weight="normal" officeooo:paragraph-rsid="0030c567" style:font-size-asian="10.5pt" style:font-weight-asian="normal" style:font-size-complex="10.5pt" style:font-weight-complex="normal"/>
    </style:style>
    <style:style style:name="P7" style:family="paragraph" style:parent-style-name="Text_20_body">
      <style:text-properties fo:font-size="10.5pt" fo:font-weight="normal" officeooo:paragraph-rsid="0030c567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font-size="10.5pt" fo:font-weight="normal" officeooo:rsid="00346b96" officeooo:paragraph-rsid="0034ca87" style:font-size-asian="10.5pt" style:font-weight-asian="normal" style:font-size-complex="10.5pt" style:font-weight-complex="normal"/>
    </style:style>
    <style:style style:name="P9" style:family="paragraph" style:parent-style-name="Standard">
      <style:text-properties fo:font-size="10.5pt" fo:font-weight="normal" officeooo:rsid="00346b96" officeooo:paragraph-rsid="00346b96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size="10.5pt" fo:font-weight="normal" officeooo:rsid="003509f9" officeooo:paragraph-rsid="003509f9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break-before="page"/>
      <style:text-properties fo:font-size="10.5pt" fo:font-weight="normal" officeooo:rsid="003509f9" officeooo:paragraph-rsid="003509f9" style:font-size-asian="10.5pt" style:font-weight-asian="normal" style:font-size-complex="10.5pt" style:font-weight-complex="normal"/>
    </style:style>
    <style:style style:name="P12" style:family="paragraph" style:parent-style-name="Text_20_body">
      <style:text-properties fo:font-size="10.5pt" fo:font-weight="normal" officeooo:rsid="003509f9" officeooo:paragraph-rsid="003509f9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size="10.5pt" fo:font-weight="normal" officeooo:rsid="0037f80e" officeooo:paragraph-rsid="003509f9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font-size="10.5pt" fo:font-weight="normal" officeooo:paragraph-rsid="003a449b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font-size="10.5pt" officeooo:paragraph-rsid="0030c567" style:font-size-asian="10.5pt" style:font-size-complex="10.5pt"/>
    </style:style>
    <style:style style:name="P16" style:family="paragraph" style:parent-style-name="Standard">
      <style:paragraph-properties fo:line-height="115%"/>
      <style:text-properties fo:font-size="10.5pt" style:font-size-asian="10.5pt" style:font-size-complex="10.5pt"/>
    </style:style>
    <style:style style:name="P17" style:family="paragraph" style:parent-style-name="Standard">
      <style:paragraph-properties fo:margin-top="0.071cm" fo:margin-bottom="0.071cm" style:contextual-spacing="false" fo:text-align="center" style:justify-single-word="false"/>
      <style:text-properties fo:font-size="10.5pt" style:font-size-asian="10.5pt" style:font-size-complex="10.5pt"/>
    </style:style>
    <style:style style:name="P18" style:family="paragraph" style:parent-style-name="Standard">
      <style:paragraph-properties fo:line-height="115%" fo:text-align="center" style:justify-single-word="false"/>
      <style:text-properties officeooo:paragraph-rsid="0030c567"/>
    </style:style>
    <style:style style:name="P19" style:family="paragraph" style:parent-style-name="Standard">
      <style:paragraph-properties fo:text-align="start" style:justify-single-word="false"/>
      <style:text-properties officeooo:paragraph-rsid="0030c567"/>
    </style:style>
    <style:style style:name="P20" style:family="paragraph" style:parent-style-name="Rodapé">
      <style:text-properties officeooo:rsid="003bca96" officeooo:paragraph-rsid="00346b96"/>
    </style:style>
    <style:style style:name="P21" style:family="paragraph" style:parent-style-name="Standard">
      <style:paragraph-properties fo:text-align="center" style:justify-single-word="false"/>
      <style:text-properties fo:font-size="10.5pt" fo:font-style="italic" fo:font-weight="bold" style:font-size-asian="10.5pt" style:font-style-asian="italic" style:font-weight-asian="bold" style:font-size-complex="10.5pt" style:font-weight-complex="bold"/>
    </style:style>
    <style:style style:name="P22" style:family="paragraph" style:parent-style-name="Standard">
      <style:paragraph-properties fo:margin-top="0.071cm" fo:margin-bottom="0.071cm" style:contextual-spacing="false"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line-height="115%" fo:text-align="center" style:justify-single-word="false"/>
      <style:text-properties fo:font-size="10.5pt" fo:font-weight="bold" officeooo:rsid="003b592b" officeooo:paragraph-rsid="003b592b" style:font-size-asian="10.5pt" style:font-weight-asian="bold" style:font-size-complex="10.5pt" style:font-weight-complex="bold"/>
    </style:style>
    <style:style style:name="P24" style:family="paragraph" style:parent-style-name="Standard">
      <style:text-properties fo:font-size="10.5pt" fo:font-weight="bold" officeooo:paragraph-rsid="0030c567" style:font-size-asian="10.5pt" style:font-weight-asian="bold" style:font-size-complex="10.5pt" style:font-weight-complex="bold"/>
    </style:style>
    <style:style style:name="P25" style:family="paragraph" style:parent-style-name="Standard">
      <style:text-properties fo:font-size="10.5pt" fo:font-weight="bold" officeooo:rsid="0037f80e" officeooo:paragraph-rsid="003509f9" style:font-size-asian="10.5pt" style:font-weight-asian="bold" style:font-size-complex="10.5pt" style:font-weight-complex="bold"/>
    </style:style>
    <style:style style:name="P26" style:family="paragraph" style:parent-style-name="Standard">
      <style:text-properties fo:font-size="10.5pt" fo:font-weight="bold" officeooo:rsid="003509f9" officeooo:paragraph-rsid="003509f9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margin-top="0.071cm" fo:margin-bottom="0.071cm" style:contextual-spacing="false" fo:text-align="center" style:justify-single-word="false"/>
      <style:text-properties fo:font-size="10.5pt" style:font-size-asian="10.5pt" style:font-size-complex="10.5pt"/>
    </style:style>
    <style:style style:name="P28" style:family="paragraph" style:parent-style-name="Standard">
      <style:text-properties fo:font-size="10.5pt" fo:font-weight="normal" officeooo:rsid="00346b96" officeooo:paragraph-rsid="0034ca87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font-size="10.5pt" fo:font-weight="normal" officeooo:paragraph-rsid="0030c567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font-size="10.5pt" fo:font-weight="normal" officeooo:rsid="003b592b" officeooo:paragraph-rsid="003b592b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font-size="10.5pt" fo:font-weight="normal" officeooo:rsid="003bca96" officeooo:paragraph-rsid="003bca96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font-size="10.5pt" fo:font-weight="normal" officeooo:rsid="003509f9" officeooo:paragraph-rsid="003509f9" style:font-size-asian="10.5pt" style:font-weight-asian="normal" style:font-size-complex="10.5pt" style:font-weight-complex="normal"/>
    </style:style>
    <style:style style:name="P33" style:family="paragraph" style:parent-style-name="Standard">
      <style:text-properties fo:font-size="10.5pt" fo:font-weight="normal" officeooo:rsid="0037f80e" officeooo:paragraph-rsid="003509f9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line-height="115%" fo:text-align="center" style:justify-single-word="false"/>
      <style:text-properties officeooo:paragraph-rsid="0030c567"/>
    </style:style>
    <style:style style:name="P35" style:family="paragraph" style:parent-style-name="Standard">
      <style:paragraph-properties fo:line-height="115%" fo:text-align="center" style:justify-single-word="false"/>
      <style:text-properties officeooo:paragraph-rsid="003bca96"/>
    </style:style>
    <style:style style:name="P36" style:family="paragraph" style:parent-style-name="Standard">
      <style:paragraph-properties fo:line-height="115%" fo:text-align="center" style:justify-single-word="false"/>
      <style:text-properties fo:font-size="15pt" fo:font-weight="bold" officeooo:rsid="003b592b" officeooo:paragraph-rsid="003b592b" style:font-size-asian="15pt" style:font-weight-asian="bold" style:font-size-complex="15pt" style:font-weight-complex="bold"/>
    </style:style>
    <style:style style:name="P37" style:family="paragraph" style:parent-style-name="Text_20_body">
      <style:text-properties officeooo:paragraph-rsid="0034ca87"/>
    </style:style>
    <style:style style:name="P38" style:family="paragraph" style:parent-style-name="Text_20_body">
      <style:text-properties officeooo:paragraph-rsid="0030c567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bold" style:font-size-asian="10.5pt" style:font-weight-asian="bold" style:font-name-complex="Times New Roman" style:font-size-complex="10.5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0.5pt" fo:font-weight="bold" style:font-size-asian="10.5pt" style:font-size-complex="10.5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0c56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3b592b"/>
    </style:style>
    <style:style style:name="T10" style:family="text">
      <style:text-properties style:text-line-through-style="none" style:text-line-through-type="none" style:font-name="Google Sans" fo:font-size="12pt" style:text-underline-style="none" fo:font-weight="normal" style:text-blinking="false"/>
    </style:style>
    <style:style style:name="T11" style:family="text"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T12" style:family="text">
      <style:text-properties style:text-line-through-style="none" style:text-line-through-type="none" style:font-name="Google Sans" fo:font-size="12pt" style:text-underline-style="none" fo:font-weight="normal" officeooo:rsid="00346b96" style:text-blinking="false" style:font-size-asian="10.5pt" style:font-weight-asian="normal" style:font-size-complex="10.5pt" style:font-weight-complex="normal" loext:padding="0cm" loext:border="none"/>
    </style:style>
    <style:style style:name="T13" style:family="text">
      <style:text-properties style:text-line-through-style="none" style:text-line-through-type="none" style:font-name="Google Sans" fo:font-size="12pt" style:text-underline-style="none" fo:font-weight="normal" officeooo:rsid="003b592b" style:text-blinking="false" style:font-size-asian="10.5pt" style:font-weight-asian="normal" style:font-size-complex="10.5pt" style:font-weight-complex="normal" loext:padding="0cm" loext:border="none"/>
    </style:style>
    <style:style style:name="T14" style:family="text">
      <style:text-properties style:text-line-through-style="none" style:text-line-through-type="none" style:font-name="Google Sans" fo:font-size="12pt" style:text-underline-style="none" fo:font-weight="normal" style:text-blinking="false" style:font-size-asian="10.5pt" style:font-weight-asian="normal" style:font-size-complex="10.5pt" style:font-weight-complex="normal" loext:padding="0cm" loext:border="none"/>
    </style:style>
    <style:style style:name="T15" style:family="text">
      <style:text-properties style:text-line-through-style="none" style:text-line-through-type="none" style:font-name="Google Sans" fo:font-size="12pt" style:text-underline-style="none" fo:font-weight="normal" style:text-blinking="false" style:font-weight-asian="normal" style:font-weight-complex="normal"/>
    </style:style>
    <style:style style:name="T16" style:family="text">
      <style:text-properties style:text-line-through-style="none" style:text-line-through-type="none" style:font-name="Google Sans" fo:font-size="12pt" style:text-underline-style="none" fo:font-weight="normal" officeooo:rsid="003b592b" style:text-blinking="false" style:font-weight-asian="normal" style:font-weight-complex="normal" loext:padding="0cm" loext:border="none"/>
    </style:style>
    <style:style style:name="T17" style:family="text">
      <style:text-properties style:text-line-through-style="none" style:text-line-through-type="none" style:font-name="Google Sans" fo:font-size="12pt" style:text-underline-style="none" fo:font-weight="normal" style:text-blinking="false" style:font-weight-asian="normal" style:font-weight-complex="normal" loext:padding="0cm" loext:border="none"/>
    </style:style>
    <style:style style:name="T18" style:family="text">
      <style:text-properties style:text-line-through-style="none" style:text-line-through-type="none" style:font-name="Google Sans" fo:font-size="12pt" style:text-underline-style="none" fo:font-weight="bold" style:text-blinking="false" style:font-weight-asian="bold" style:font-weight-complex="bold" loext:padding="0cm" loext:border="none"/>
    </style:style>
    <style:style style:name="T19" style:family="text">
      <style:text-properties style:text-line-through-style="none" style:text-line-through-type="none" style:font-name="monospace" fo:font-size="10.5pt" style:text-underline-style="none" fo:font-weight="normal" officeooo:rsid="003b592b" style:text-blinking="false" style:font-size-asian="10.5pt" style:font-weight-asian="normal" style:font-size-complex="10.5pt" style:font-weight-complex="normal" loext:padding-left="0cm" loext:padding-right="0cm" loext:padding-top="0cm" loext:padding-bottom="0.049cm" loext:border-left="none" loext:border-right="none" loext:border-top="none" loext:border-bottom="0.06pt solid #2c2e35"/>
    </style:style>
    <style:style style:name="T20" style:family="text">
      <style:text-properties style:text-line-through-style="none" style:text-line-through-type="none" style:font-name="monospace" fo:font-size="10.5pt" style:text-underline-style="none" fo:font-weight="normal" style:text-blinking="false" style:font-weight-asian="normal" style:font-weight-complex="normal" loext:padding-left="0cm" loext:padding-right="0cm" loext:padding-top="0cm" loext:padding-bottom="0.049cm" loext:border-left="none" loext:border-right="none" loext:border-top="none" loext:border-bottom="0.06pt solid #2c2e35"/>
    </style:style>
    <style:style style:name="T21" style:family="text">
      <style:text-properties style:text-line-through-style="none" style:text-line-through-type="none" style:font-name="monospace" fo:font-size="10.5pt" style:text-underline-style="none" fo:font-weight="normal" style:text-blinking="false" style:font-weight-asian="normal" style:font-weight-complex="normal" loext:padding="0cm" loext:border="none"/>
    </style:style>
    <style:style style:name="T22" style:family="text">
      <style:text-properties style:text-line-through-style="none" style:text-line-through-type="none" fo:font-size="12pt" style:text-underline-style="none" style:text-blinking="false" style:font-size-asian="10.5pt" style:font-size-complex="10.5pt" loext:padding="0cm" loext:border="none"/>
    </style:style>
    <style:style style:name="T23" style:family="text">
      <style:text-properties style:text-line-through-style="none" style:text-line-through-type="none" fo:font-size="10.5pt" style:text-underline-style="none" fo:font-weight="normal" officeooo:rsid="003b592b" style:text-blinking="false" style:font-size-asian="10.5pt" style:font-weight-asian="normal" style:font-size-complex="10.5pt" style:font-weight-complex="normal" loext:padding-left="0cm" loext:padding-right="0cm" loext:padding-top="0cm" loext:padding-bottom="0.049cm" loext:border-left="none" loext:border-right="none" loext:border-top="none" loext:border-bottom="0.06pt solid #2c2e35"/>
    </style:style>
    <style:style style:name="T24" style:family="text">
      <style:text-properties officeooo:rsid="003bca96"/>
    </style:style>
    <style:style style:name="T25" style:family="text">
      <style:text-properties fo:font-size="15pt" fo:font-weight="bold" style:font-size-asian="15pt" style:font-weight-asian="bold" style:font-name-complex="Times New Roman" style:font-size-complex="15pt" style:font-weight-complex="bold"/>
    </style:style>
    <style:style style:name="T26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27" style:family="text">
      <style:text-properties fo:font-size="14pt" fo:font-weight="bold" officeooo:rsid="003bca96" style:font-size-asian="14pt" style:font-weight-asian="bold" style:font-name-complex="Times New Roman" style:font-size-complex="14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8" text:anchor-type="page" text:anchor-page-number="10" svg:x="2.757cm" svg:y="2.785cm" svg:width="15cm" svg:height="9.975cm" draw:z-index="18">
        <draw:image xlink:href="Pictures/100000010000033500000222F7554D1B.png" xlink:type="simple" xlink:show="embed" xlink:actuate="onLoad" draw:mime-type="image/png"/>
      </draw:frame>
      <draw:frame draw:style-name="fr2" draw:name="Image17" text:anchor-type="page" text:anchor-page-number="9" svg:x="2.672cm" svg:y="18.381cm" svg:width="15cm" svg:height="7.84cm" draw:z-index="17">
        <draw:image xlink:href="Pictures/100000010000032B000001A8EEC6496B.png" xlink:type="simple" xlink:show="embed" xlink:actuate="onLoad" draw:mime-type="image/png"/>
      </draw:frame>
      <draw:frame draw:style-name="fr2" draw:name="Image16" text:anchor-type="page" text:anchor-page-number="9" svg:x="2.766cm" svg:y="13.257cm" svg:width="15cm" svg:height="4.879cm" draw:z-index="16">
        <draw:image xlink:href="Pictures/10000001000003130000010056B7EDDB.png" xlink:type="simple" xlink:show="embed" xlink:actuate="onLoad" draw:mime-type="image/png"/>
      </draw:frame>
      <draw:frame draw:style-name="fr2" draw:name="Image15" text:anchor-type="page" text:anchor-page-number="9" svg:x="2.87cm" svg:y="2.369cm" svg:width="15cm" svg:height="10.405cm" draw:z-index="15">
        <draw:image xlink:href="Pictures/10000001000003090000021B25A694DD.png" xlink:type="simple" xlink:show="embed" xlink:actuate="onLoad" draw:mime-type="image/png"/>
      </draw:frame>
      <draw:frame draw:style-name="fr2" draw:name="Image14" text:anchor-type="page" text:anchor-page-number="8" svg:x="3.009cm" svg:y="12.977cm" svg:width="15cm" svg:height="10.405cm" draw:z-index="14">
        <draw:image xlink:href="Pictures/10000001000003090000021B8B6CC74B.png" xlink:type="simple" xlink:show="embed" xlink:actuate="onLoad" draw:mime-type="image/png"/>
      </draw:frame>
      <draw:frame draw:style-name="fr3" draw:name="Image13" text:anchor-type="page" text:anchor-page-number="8" svg:x="0cm" svg:y="0cm" svg:width="15cm" svg:height="10.405cm" draw:z-index="13">
        <draw:image xlink:href="Pictures/10000001000003090000021B5B7DDFC4.png" xlink:type="simple" xlink:show="embed" xlink:actuate="onLoad" draw:mime-type="image/png"/>
      </draw:frame>
      <draw:frame draw:style-name="fr2" draw:name="Image12" text:anchor-type="page" text:anchor-page-number="7" svg:x="2.741cm" svg:y="17.013cm" svg:width="14.667cm" svg:height="4.512cm" draw:z-index="12">
        <draw:image xlink:href="Pictures/1000000100000317000000F8BBFFAD06.png" xlink:type="simple" xlink:show="embed" xlink:actuate="onLoad" draw:mime-type="image/png"/>
      </draw:frame>
      <draw:frame draw:style-name="fr2" draw:name="Image11" text:anchor-type="page" text:anchor-page-number="7" svg:x="2.591cm" svg:y="11.67cm" svg:width="15cm" svg:height="4.703cm" draw:z-index="11">
        <draw:image xlink:href="Pictures/1000000100000317000000F8A884EDD4.png" xlink:type="simple" xlink:show="embed" xlink:actuate="onLoad" draw:mime-type="image/png"/>
      </draw:frame>
      <draw:frame draw:style-name="fr2" draw:name="Image10 Copy 1" text:anchor-type="page" text:anchor-page-number="7" svg:x="2.785cm" svg:y="2.339cm" svg:width="15cm" svg:height="8.544cm" draw:z-index="10">
        <draw:image xlink:href="Pictures/1000000100000324000001CAE8E6CD98.png" xlink:type="simple" xlink:show="embed" xlink:actuate="onLoad" draw:mime-type="image/png"/>
      </draw:frame>
      <draw:frame draw:style-name="fr2" draw:name="Image9" text:anchor-type="page" text:anchor-page-number="6" svg:x="2.868cm" svg:y="15.374cm" svg:width="15cm" svg:height="5.715cm" draw:z-index="9">
        <draw:image xlink:href="Pictures/1000000100000266000000EA3B622FCE.png" xlink:type="simple" xlink:show="embed" xlink:actuate="onLoad" draw:mime-type="image/png"/>
      </draw:frame>
      <draw:frame draw:style-name="fr2" draw:name="Image8" text:anchor-type="page" text:anchor-page-number="6" svg:x="2.868cm" svg:y="4.542cm" svg:width="15cm" svg:height="7.348cm" draw:z-index="8">
        <draw:image xlink:href="Pictures/100000010000034B0000019DA70F153D.png" xlink:type="simple" xlink:show="embed" xlink:actuate="onLoad" draw:mime-type="image/png"/>
      </draw:frame>
      <draw:frame draw:style-name="fr2" draw:name="Image7" text:anchor-type="page" text:anchor-page-number="5" svg:x="2.896cm" svg:y="19.048cm" svg:width="13.494cm" svg:height="4.233cm" draw:z-index="7">
        <draw:image xlink:href="Pictures/10000001000001FE000000A0C82DDA34.png" xlink:type="simple" xlink:show="embed" xlink:actuate="onLoad" draw:mime-type="image/png"/>
      </draw:frame>
      <draw:frame draw:style-name="fr2" draw:name="Image6" text:anchor-type="page" text:anchor-page-number="5" svg:x="2.983cm" svg:y="12.151cm" svg:width="15cm" svg:height="2.84cm" draw:z-index="6">
        <draw:image xlink:href="Pictures/1000000100000328000000990A192E54.png" xlink:type="simple" xlink:show="embed" xlink:actuate="onLoad" draw:mime-type="image/png"/>
      </draw:frame>
      <draw:frame draw:style-name="fr3" draw:name="Image4" text:anchor-type="page" text:anchor-page-number="5" svg:x="0cm" svg:y="0cm" svg:width="15cm" svg:height="10.104cm" draw:z-index="5">
        <draw:image xlink:href="Pictures/100000010000032F000002254E1ACC07.png" xlink:type="simple" xlink:show="embed" xlink:actuate="onLoad" draw:mime-type="image/png"/>
      </draw:frame>
      <draw:frame draw:style-name="fr2" draw:name="Image5" text:anchor-type="page" text:anchor-page-number="4" svg:x="3.007cm" svg:y="12.256cm" svg:width="15cm" svg:height="10.104cm" draw:z-index="4">
        <draw:image xlink:href="Pictures/100000010000032F000002258D0E6B32.png" xlink:type="simple" xlink:show="embed" xlink:actuate="onLoad" draw:mime-type="image/png"/>
      </draw:frame>
      <draw:frame draw:style-name="fr3" draw:name="Image3" text:anchor-type="page" text:anchor-page-number="4" svg:x="0cm" svg:y="0cm" svg:width="15cm" svg:height="10.104cm" draw:z-index="3">
        <draw:image xlink:href="Pictures/100000010000032F0000022580902E6E.png" xlink:type="simple" xlink:show="embed" xlink:actuate="onLoad" draw:mime-type="image/png"/>
      </draw:frame>
      <draw:frame draw:style-name="fr2" draw:name="Image2" text:anchor-type="page" text:anchor-page-number="3" svg:x="2.815cm" svg:y="5.849cm" svg:width="15cm" svg:height="10.188cm" draw:z-index="2">
        <draw:image xlink:href="Pictures/10000001000003340000022D6D3C76FA.png" xlink:type="simple" xlink:show="embed" xlink:actuate="onLoad" draw:mime-type="image/png"/>
      </draw:frame>
      <draw:frame draw:style-name="fr2" draw:name="Image19" text:anchor-type="page" text:anchor-page-number="10" svg:x="2.923cm" svg:y="14.395cm" svg:width="8.758cm" svg:height="1.402cm" draw:z-index="19">
        <draw:image xlink:href="Pictures/100000010000014B00000035E109D7BD.png" xlink:type="simple" xlink:show="embed" xlink:actuate="onLoad" draw:mime-type="image/png"/>
      </draw:frame>
      <draw:frame draw:style-name="fr2" draw:name="Image1" text:anchor-type="page" text:anchor-page-number="11" svg:x="2.932cm" svg:y="4.036cm" svg:width="15cm" svg:height="10.012cm" draw:z-index="20">
        <draw:image xlink:href="Pictures/100000010000033200000222CE847633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draw:frame draw:style-name="fr1" draw:name="figuras1" text:anchor-type="as-char" svg:y="0.483cm" svg:width="1.647cm" style:rel-width="scale" svg:height="1.655cm" style:rel-height="scale" draw:z-index="0"><draw:image xlink:href="Pictures/10000000000001690000016AE3AA8E61.jpg" xlink:type="simple" xlink:show="embed" xlink:actuate="onLoad" draw:mime-type="image/jpeg"/></draw:frame></text:p>
            <text:p text:style-name="P17"/>
          </table:table-cell>
          <table:table-cell table:style-name="Table1.A1" office:value-type="string">
            <text:p text:style-name="P17">Ministério da Educação</text:p>
            <text:p text:style-name="P22">UNIVERSIDADE TECNOLÓGICA FEDERAL DO PARANÁ</text:p>
            <text:p text:style-name="P21">Campus Guara</text:p>
          </table:table-cell>
          <table:table-cell table:style-name="Table1.A1" office:value-type="string">
            <text:p text:style-name="P3"><draw:frame draw:style-name="fr1" draw:name="figuras2" text:anchor-type="as-char" svg:y="0cm" svg:width="3.161cm" style:rel-width="scale" svg:height="1.154cm" style:rel-height="scale" draw:z-index="1"><draw:image xlink:href="Pictures/10000000000002FE000001181D563E92.jpg" xlink:type="simple" xlink:show="embed" xlink:actuate="onLoad" draw:mime-type="image/jpeg"/></draw:frame></text:p>
          </table:table-cell>
        </table:table-row>
      </table:table>
      <text:p text:style-name="P16"/>
      <text:p text:style-name="P4">Curso de Tecnologia em Sistemas para Internet</text:p>
      <text:p text:style-name="P4">Disciplina de Fundamentos de Sistemas Computacionais</text:p>
      <text:p text:style-name="P4">Professora Dra. Sediane Carmem Lunardi Hernandes</text:p>
      <text:p text:style-name="P16"><text:span text:style-name="T6"/></text:p>
      <text:p text:style-name="P16"><text:span text:style-name="T6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6">Jose Augusto Farias <text:s/><text:span text:style-name="T24">de Freitas</text:span> </text:p>
      <text:p text:style-name="P15"><text:span text:style-name="T7"/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6"/></text:span></text:p>
      <text:p text:style-name="P18"><text:span text:style-name="Fonte_20_parág._20_padrão"><text:span text:style-name="T26"/></text:span></text:p>
      <text:p text:style-name="P35"><text:span text:style-name="Fonte_20_parág._20_padrão"><text:span text:style-name="T27">Guarapuava 18 de junho</text:span></text:span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"/></text:span></text:p>
      <text:p text:style-name="P18"><text:span text:style-name="Fonte_20_parág._20_padrão"><text:span text:style-name="T25">TRABALHO FINAL </text:span></text:span></text:p>
      <text:p text:style-name="P19"><text:span text:style-name="Fonte_20_parág._20_padrão"><text:span text:style-name="T2"><text:s text:c="95"/></text:span></text:span></text:p>
      <text:p text:style-name="P19"><text:span text:style-name="Fonte_20_parág._20_padrão"><text:span text:style-name="T2"/></text:span></text:p>
      <text:p text:style-name="P19"><text:span text:style-name="Fonte_20_parág._20_padrão"><text:span text:style-name="T2"/></text:span></text:p>
      <text:p text:style-name="P5"><text:soft-page-break/></text:p>
      <text:p text:style-name="P5">COMANDOS DE CONTROLE DE PROCESSOS</text:p>
      <text:p text:style-name="P5">O comando top - <text:span text:style-name="T8">este comando exibe em tempo real informações sobre seu sistema Linux, processos em andamento e recursos do sistema, incluídos CPU, memória RAM e uso do swap, além do número total de tarefas sendo executadas </text:span></text:p>
      <text:p text:style-name="P6">Sintaxe: top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Exercício A: <text:span text:style-name="T8">Abra o firefox, um editor de texto e vários outros programas e depois execute o comando top. Veja como as trocas entre processos são muito dinâmicas. Agora, responda em detalhes: O que o cabeçalho do comando mostra e o que cada coluna do comando significa? Para cancelar o comando utilize a combinação de teclas CTRL + C. Lembrando que: CTRL + C → encerra o processo em execução. CTRL + Z → suspende um processo</text:span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7"><text:span text:style-name="T8"/></text:p>
      <text:p text:style-name="P7">O comando <text:span text:style-name="Source_20_Text">top</text:span> exibe informações em tempo real sobre o sistema e os processos em execução. No cabeçalho são mostrados a hora atual, o tempo de funcionamento do sistema, o número de usuários conectados, a carga média do sistema, o uso da CPU, da memória RAM e da memória swap. A tabela de processos apresenta informações como o PID (identificador do processo), usuário responsável, prioridade, uso de memória, uso de CPU, tempo de execução e o comando executado. Ao abrir vários programas, os valores mudam constantemente porque o sistema operacional alterna rapidamente a execução dos processos. Para encerrar o comando <text:span text:style-name="Source_20_Text">top</text:span>, utiliza-se <text:span text:style-name="Strong_20_Emphasis">CTRL + C</text:span>; para suspender um processo, utiliza-se <text:span text:style-name="Strong_20_Emphasis">CTRL + Z</text:span>.</text:p>
      <text:p text:style-name="P6"/>
      <text:p text:style-name="P6"/>
      <text:p text:style-name="P6"><text:span text:style-name="T6">Exercício B:</text:span> Crie dois novos usuários pedro e madalena. Depois, alterne para o usuário pedro e digite o comando top no terminal dele. Novamente, alterne para o usuário madalena e digite top no terminal dele. Por fim, alterne para o seu usuário e digite top no seu terminal. Perceba as atividades em tempo real dos diferentes usuários do SO Linux e seus processos. Faça um print de tela salvando-o. Você pode fazer isso alternando o usuário utilizando a parte gráfica do Sistema Operacional.</text:p>
      <text:p text:style-name="P30">R: na page 11</text:p>
      <text:p text:style-name="P6"/>
      <text:p text:style-name="P6"><text:span text:style-name="T6">Exercício C: </text:span>Teste todas as opções do comando ps e também ps –aux, ps -u </text:p>
      <text:p text:style-name="P6"/>
      <text:p text:style-name="P38"><text:span text:style-name="Source_20_Text">p</text:span><text:span text:style-name="Source_20_Text"><text:span text:style-name="T19">s</text:span></text:span><text:span text:style-name="Strong_20_Emphasis"><text:span text:style-name="T14"> (sem opções):</text:span></text:span><text:span text:style-name="T14"> Lista apenas os processos que estão sendo executados no terminal atual.</text:span><text:span text:style-name="Strong_20_Emphasis"><text:span text:style-name="Source_20_Text"><text:span text:style-name="T20">ps aux</text:span></text:span></text:span><text:span text:style-name="Strong_20_Emphasis"><text:span text:style-name="T17">:</text:span></text:span><text:span text:style-name="T17"> Exibe uma lista detalhada de </text:span><text:span text:style-name="Strong_20_Emphasis"><text:span text:style-name="T17">todos</text:span></text:span><text:span text:style-name="T17"> os processos em execução no sistema, incluindo aqueles de outros usuários e sem terminal associado.</text:span><text:span text:style-name="Strong_20_Emphasis"><text:span text:style-name="Source_20_Text"><text:span text:style-name="T20">ps -u</text:span></text:span></text:span><text:span text:style-name="Strong_20_Emphasis"><text:span text:style-name="T17"> (ou </text:span></text:span><text:span text:style-name="Strong_20_Emphasis"><text:span text:style-name="Source_20_Text"><text:span text:style-name="T20">ps -u [usuário]</text:span></text:span></text:span><text:span text:style-name="Strong_20_Emphasis"><text:span text:style-name="T17">):</text:span></text:span><text:span text:style-name="T17"> Exibe processos de um usuário específico, mostrando detalhes como CPU, memória e tempo de início.</text:span><text:span text:style-name="T15">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31">R:</text:p>
      <text:p text:style-name="P8"/>
      <text:p text:style-name="P8"/>
      <text:p text:style-name="P8"/>
      <text:p text:style-name="P8"/>
      <text:p text:style-name="P8"/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>Exercício D:</text:span> No terminal do Linux digite man ps. Agora veja que aparecem várias opções de uso do comando. Em especial teste os comandos abaixo e explique a saída deles. $ ps aux $ ps axjf $ ps -U root -u root u $ ps -ao pid,user,cmd</text:p>
      <text:p text:style-name="P8"/>
      <text:p text:style-name="P37"><text:span text:style-name="Source_20_Text"><text:span text:style-name="T12">p</text:span></text:span><text:span text:style-name="Source_20_Text"><text:span text:style-name="T13">s</text:span></text:span><text:span text:style-name="Source_20_Text"><text:span text:style-name="T23"> </text:span></text:span><text:span text:style-name="Source_20_Text"><text:span text:style-name="T19">aux</text:span></text:span><text:span text:style-name="T12"> Exibe uma lista detalhada de</text:span><text:span text:style-name="T12"> </text:span><text:span text:style-name="Strong_20_Emphasis"><text:span text:style-name="T13">todos os processos </text:span></text:span><text:span text:style-name="T12"><text:s/></text:span><text:span text:style-name="T12">rodando no sistema, de todos os usuários, incluindo detalhes como uso de CPU, memória e o comando que iniciou o processo.</text:span><text:span text:style-name="Strong_20_Emphasis"><text:span text:style-name="Source_20_Text"><text:span text:style-name="T20">ps axjf</text:span></text:span></text:span><text:span text:style-name="T11">: Mostra os processos no formato BSD, exibindo uma </text:span><text:span text:style-name="Strong_20_Emphasis"><text:span text:style-name="T17">árvore de processos</text:span></text:span><text:span text:style-name="T18"> </text:span><text:span text:style-name="T11">(parent-child relationship) que ajuda a visualizar qual programa iniciou qual processo.</text:span><text:span text:style-name="T10"> </text:span><text:span text:style-name="Strong_20_Emphasis"><text:span text:style-name="Source_20_Text"><text:span text:style-name="T21">ps -U [usuário]</text:span></text:span></text:span><text:span text:style-name="T11">: Esta estrutura é usada para listar todos os processos pertencentes a um </text:span><text:span text:style-name="Strong_20_Emphasis"><text:span text:style-name="T16">usuario em especifico 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6">Exercício E: Abra o firefox, um editor de texto (pico &amp;) e vários outros programas (p.e., gedit) e depois execute o comando pidof. Verifique se o comando faz o que se propõe.</text:span></text:p>
      <text:p text:style-name="P2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5">Retorno do </text:span><text:span text:style-name="Source_20_Text"><text:span text:style-name="T5">pidof firefox</text:span></text:span><text:span text:style-name="T5">:</text:span> <text:span text:style-name="T9">R</text:span><text:span text:style-name="T6">etorna vários números separados por espaço (exemplo ilustrativo: </text:span><text:span text:style-name="Source_20_Text"><text:span text:style-name="T6">5432 5310 5288</text:span></text:span><text:span text:style-name="T6">). Isso acontece porque navegadores modernos como o Firefox criam múltiplos processos ao mesmo tempo (um processo para o programa em si, e outros para abas, extensões e áudio)</text:span>.</text:p>
      <text:p text:style-name="Text_20_body"><text:soft-page-break/><text:span text:style-name="T4">Retorno do </text:span><text:span text:style-name="Source_20_Text"><text:span text:style-name="T4">pidof pico</text:span></text:span><text:span text:style-name="T4">:</text:span><text:span text:style-name="T1"> </text:span><text:span text:style-name="T3">Retorna um único número inteiro (exemplo ilustrativo: </text:span><text:span text:style-name="Source_20_Text"><text:span text:style-name="T3">6012</text:span></text:span><text:span text:style-name="T3">). Esse é o ID exato do editor </text:span><text:span text:style-name="Source_20_Text"><text:span text:style-name="T3">pico</text:span></text:span><text:span text:style-name="T3"> que foi aberto em segundo plano.</text:span></text:p>
      <text:p text:style-name="Text_20_body"><text:span text:style-name="T1"/></text:p>
      <text:p text:style-name="Text_20_body"><text:span text:style-name="T3">Exercício F: Execute os comandos acima, anote o que acontece e tire um print de tela salvando-o. Depois, coloque em execução pelo menos 2 programas (processos). Por exemplo: $ firefox &amp; $ pico &amp; Pare o firefox usando kill –STOP </text:span></text:p>
      <text:p text:style-name="P39"><text:span text:style-name="T1"/></text:p>
      <text:p text:style-name="Text_20_body"><text:span text:style-name="T1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6">Exercício H: Quais processos estão suspensos (parados) e em background em seu SO? Anote e faça um print de tela salvando-o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6">Exercício I: Faça o que se pede e ao final dê um print de tela mostrando o comportamento dos comandos digitados.</text:span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/></text:p>
      <text:p text:style-name="P10"><text:span text:style-name="T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6">Exercício J: Faça o mesmo exercício com o firefox e dê um print de tela salvando-o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6">Exercício K: Teste os comandos dos exemplos acima e faça um print de tela.</text:span></text:p>
      <text:p text:style-name="P13"/>
      <text:p text:style-name="P13"><text:soft-page-break/></text:p>
      <text:p text:style-name="P31">R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6">Exercício L:</text:span> <text:span text:style-name="T6">Execute os comandos nice e recine abaixo tire print de tela salvando as execuções. </text:span></text:p>
      <text:p text:style-name="P2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6">M) Para não perder o compromisso O comando date – O comando date exibe e edita a data e a hora atuais do sistema.</text:span></text:p>
      <text:p text:style-name="P25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0"><text:span text:style-name="T6">Resposta do ex B:</text:span></text:p>
      <text:p text:style-name="P14"><text:soft-page-break/><text:span text:style-name="T6">Exercício B:</text:span> Crie dois novos usuários pedro e madalena. Depois, alterne para o usuário pedro e digite o comando top no terminal dele. Novamente, alterne para o usuário madalena e digite top no terminal dele. Por fim, alterne para o seu usuário e digite top no seu terminal. Perceba as atividades em tempo real dos diferentes usuários do SO Linux e seus processos. Faça um print de tela salvando-o. Você pode fazer isso alternando o </text:p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orphans="2" fo:widows="2" fo:hyphenation-ladder-count="no-limit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fo:text-indent="-1.27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fo:text-indent="-1.27cm" fo:margin-left="1.69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59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86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0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7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fo:text-indent="-1.27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–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–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–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–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Rodapé">
      <style:paragraph-properties fo:text-align="center" style:justify-single-word="false"/>
    </style:style>
    <style:style style:name="MP2" style:family="paragraph" style:parent-style-name="Rodapé">
      <style:text-properties officeooo:rsid="003bca96" officeooo:paragraph-rsid="00346b96"/>
    </style:style>
    <style:style style:name="MT1" style:family="text">
      <style:text-properties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Fonte_20_parág._20_padrão"><text:span text:style-name="MT1"><text:page-number text:select-page="current">11</text:page-number></text:span></text:span></text:p>
        <text:p text:style-name="Rodapé"/>
        <text:p text:style-name="Rodapé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Sediane Hernandes</meta:initial-creator>
    <meta:creation-date>2026-04-28T14:06:00Z</meta:creation-date>
    <dc:date>2026-06-23T19:23:35.636141119</dc:date>
    <meta:print-date>2020-03-15T16:16:00Z</meta:print-date>
    <meta:editing-cycles>24</meta:editing-cycles>
    <meta:editing-duration>PT1H19M40S</meta:editing-duration>
    <meta:document-statistic meta:table-count="1" meta:image-count="21" meta:object-count="0" meta:page-count="11" meta:paragraph-count="38" meta:word-count="886" meta:character-count="5277" meta:non-whitespace-character-count="4319"/>
    <meta:user-defined meta:name="AppVersion">16.0000</meta:user-defined>
    <meta:user-defined meta:name="DocSecurity" meta:value-type="float">0</meta:user-defined>
    <meta:user-defined meta:name="GrammarlyDocumentId">999d69d0-ddfa-4613-8750-8e03bb590f7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Downloads/isaquecordeiroatv/isaquecordeiroatv.odt/Normal.dotm"/>
  </office:meta>
</office:document-meta>
</file>